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officeooo:rsid="000b3267" officeooo:paragraph-rsid="000b3267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9pt" officeooo:rsid="000c79af" officeooo:paragraph-rsid="000c79af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officeooo:rsid="000b3267" officeooo:paragraph-rsid="000b3267"/>
    </style:style>
    <style:style style:name="P4" style:family="paragraph" style:parent-style-name="Standard">
      <style:paragraph-properties fo:text-align="center" style:justify-single-word="false"/>
      <style:text-properties officeooo:rsid="000c79af" officeooo:paragraph-rsid="000c79af"/>
    </style:style>
    <style:style style:name="P5" style:family="paragraph" style:parent-style-name="Standard">
      <style:text-properties officeooo:rsid="000b3267" officeooo:paragraph-rsid="000b3267"/>
    </style:style>
    <style:style style:name="P6" style:family="paragraph" style:parent-style-name="Text_20_body" style:list-style-name="L1">
      <style:text-properties officeooo:rsid="000b3267" officeooo:paragraph-rsid="000b3267"/>
    </style:style>
    <style:style style:name="P7" style:family="paragraph" style:parent-style-name="Text_20_body" style:list-style-name="L2">
      <style:text-properties officeooo:rsid="000b3267" officeooo:paragraph-rsid="000b3267"/>
    </style:style>
    <style:style style:name="P8" style:family="paragraph" style:parent-style-name="Text_20_body" style:list-style-name="L2">
      <style:text-properties officeooo:rsid="00184e85" officeooo:paragraph-rsid="00184e85"/>
    </style:style>
    <style:style style:name="P9" style:family="paragraph" style:parent-style-name="Text_20_body" style:list-style-name="L2">
      <style:text-properties officeooo:rsid="000c74de" officeooo:paragraph-rsid="000c74de"/>
    </style:style>
    <style:style style:name="P10" style:family="paragraph" style:parent-style-name="Heading_20_1">
      <style:text-properties officeooo:rsid="001e0773" officeooo:paragraph-rsid="001e0773"/>
    </style:style>
    <style:style style:name="P11" style:family="paragraph" style:parent-style-name="Text_20_body">
      <style:text-properties officeooo:rsid="001e0773" officeooo:paragraph-rsid="001e0773"/>
    </style:style>
    <style:style style:name="P12" style:family="paragraph" style:parent-style-name="Heading_20_1">
      <style:text-properties officeooo:rsid="000b3267" officeooo:paragraph-rsid="000b3267"/>
    </style:style>
    <style:style style:name="P13" style:family="paragraph" style:parent-style-name="Standard" style:list-style-name="L3"/>
    <style:style style:name="P14" style:family="paragraph" style:parent-style-name="Standard" style:list-style-name="L4">
      <style:text-properties officeooo:paragraph-rsid="0025786f"/>
    </style:style>
    <style:style style:name="P15" style:family="paragraph" style:parent-style-name="Standard" style:list-style-name="L4">
      <style:text-properties officeooo:paragraph-rsid="000f3f4f"/>
    </style:style>
    <style:style style:name="P16" style:family="paragraph" style:parent-style-name="Standard" style:list-style-name="L4">
      <style:text-properties officeooo:paragraph-rsid="000b3267"/>
    </style:style>
    <style:style style:name="P17" style:family="paragraph" style:parent-style-name="Standard" style:list-style-name="L5">
      <style:text-properties officeooo:paragraph-rsid="000b3267"/>
    </style:style>
    <style:style style:name="P18" style:family="paragraph" style:parent-style-name="Standard" style:list-style-name="L6">
      <style:text-properties officeooo:rsid="0021118b" officeooo:paragraph-rsid="0021118b"/>
    </style:style>
    <style:style style:name="P19" style:family="paragraph" style:parent-style-name="Standard">
      <style:text-properties officeooo:rsid="0021118b" officeooo:paragraph-rsid="0021118b"/>
    </style:style>
    <style:style style:name="P20" style:family="paragraph" style:parent-style-name="Standard" style:list-style-name="L4">
      <style:text-properties officeooo:paragraph-rsid="0021118b"/>
    </style:style>
    <style:style style:name="P21" style:family="paragraph" style:parent-style-name="Standard" style:list-style-name="L4">
      <style:text-properties officeooo:paragraph-rsid="00291c71"/>
    </style:style>
    <style:style style:name="P22" style:family="paragraph" style:parent-style-name="Standard">
      <style:text-properties officeooo:rsid="0021118b" officeooo:paragraph-rsid="002f93d9"/>
    </style:style>
    <style:style style:name="P23" style:family="paragraph" style:parent-style-name="Standard" style:list-style-name="L7">
      <style:text-properties fo:font-weight="bold" officeooo:rsid="002f93d9" officeooo:paragraph-rsid="002f93d9" style:font-weight-asian="bold" style:font-weight-complex="bold"/>
    </style:style>
    <style:style style:name="P24" style:family="paragraph" style:parent-style-name="Standard" style:list-style-name="L8"/>
    <style:style style:name="P25" style:family="paragraph" style:parent-style-name="Standard">
      <style:text-properties officeooo:paragraph-rsid="00176c3e"/>
    </style:style>
    <style:style style:name="P26" style:family="paragraph" style:parent-style-name="Standard">
      <style:text-properties officeooo:rsid="001641be" officeooo:paragraph-rsid="001641be"/>
    </style:style>
    <style:style style:name="P27" style:family="paragraph" style:parent-style-name="Text_20_body">
      <style:text-properties officeooo:rsid="001641be" officeooo:paragraph-rsid="001641be"/>
    </style:style>
    <style:style style:name="P28" style:family="paragraph" style:parent-style-name="Text_20_body">
      <style:text-properties officeooo:rsid="002b011d" officeooo:paragraph-rsid="002b011d"/>
    </style:style>
    <style:style style:name="P29" style:family="paragraph" style:parent-style-name="Text_20_body">
      <style:text-properties officeooo:rsid="001f4653" officeooo:paragraph-rsid="001f4653"/>
    </style:style>
    <style:style style:name="P30" style:family="paragraph" style:parent-style-name="Heading_20_1">
      <style:text-properties officeooo:paragraph-rsid="000b3267"/>
    </style:style>
    <style:style style:name="P31" style:family="paragraph" style:parent-style-name="Text_20_body" style:list-style-name="L9">
      <style:text-properties officeooo:paragraph-rsid="000b3267"/>
    </style:style>
    <style:style style:name="P32" style:family="paragraph" style:parent-style-name="Standard" style:list-style-name="L10">
      <style:text-properties officeooo:paragraph-rsid="000b3267"/>
    </style:style>
    <style:style style:name="P33" style:family="paragraph" style:parent-style-name="Standard" style:list-style-name="L11"/>
    <style:style style:name="P34" style:family="paragraph" style:parent-style-name="Standard" style:list-style-name="L11">
      <style:paragraph-properties>
        <style:tab-stops>
          <style:tab-stop style:position="2.311cm"/>
        </style:tab-stops>
      </style:paragraph-properties>
    </style:style>
    <style:style style:name="P35" style:family="paragraph" style:parent-style-name="Text_20_body" style:list-style-name="L12">
      <style:text-properties officeooo:rsid="002c9833" officeooo:paragraph-rsid="002c9833"/>
    </style:style>
    <style:style style:name="P36" style:family="paragraph" style:parent-style-name="Text_20_body" style:list-style-name="L12">
      <style:text-properties officeooo:paragraph-rsid="000c79af"/>
    </style:style>
    <style:style style:name="P37" style:family="paragraph" style:parent-style-name="Standard" style:list-style-name="L12">
      <style:text-properties officeooo:paragraph-rsid="002c9833"/>
    </style:style>
    <style:style style:name="P38" style:family="paragraph" style:parent-style-name="Standard" style:list-style-name="L12">
      <style:text-properties officeooo:rsid="000c79af" officeooo:paragraph-rsid="000c79af"/>
    </style:style>
    <style:style style:name="P39" style:family="paragraph" style:parent-style-name="Standard" style:list-style-name="L12">
      <style:text-properties officeooo:rsid="002d886c" officeooo:paragraph-rsid="002d886c"/>
    </style:style>
    <style:style style:name="P40" style:family="paragraph" style:parent-style-name="Standard" style:list-style-name="L12"/>
    <style:style style:name="P41" style:family="paragraph" style:parent-style-name="Standard" style:list-style-name="L12">
      <style:text-properties officeooo:rsid="0013f8f5" officeooo:paragraph-rsid="0013f8f5"/>
    </style:style>
    <style:style style:name="P42" style:family="paragraph" style:parent-style-name="Standard" style:list-style-name="L13"/>
    <style:style style:name="P43" style:family="paragraph" style:parent-style-name="Standard" style:list-style-name="L13">
      <style:text-properties officeooo:rsid="001328eb" officeooo:paragraph-rsid="001328eb"/>
    </style:style>
    <style:style style:name="P44" style:family="paragraph" style:parent-style-name="Standard" style:list-style-name="L13">
      <style:text-properties officeooo:paragraph-rsid="000b3267"/>
    </style:style>
    <style:style style:name="P45" style:family="paragraph" style:parent-style-name="Standard" style:list-style-name="L14"/>
    <style:style style:name="P46" style:family="paragraph" style:parent-style-name="Standard" style:list-style-name="L15"/>
    <style:style style:name="P47" style:family="paragraph" style:parent-style-name="Standard" style:list-style-name="L16"/>
    <style:style style:name="T1" style:family="text">
      <style:text-properties officeooo:rsid="001e0773"/>
    </style:style>
    <style:style style:name="T2" style:family="text">
      <style:text-properties officeooo:rsid="0031ba60"/>
    </style:style>
    <style:style style:name="T3" style:family="text">
      <style:text-properties officeooo:rsid="002f93d9"/>
    </style:style>
    <style:style style:name="T4" style:family="text">
      <style:text-properties fo:font-family="'Courier New'" style:font-family-generic="modern" style:font-pitch="fixed" officeooo:rsid="002f93d9"/>
    </style:style>
    <style:style style:name="T5" style:family="text">
      <style:text-properties officeooo:rsid="0023d66a"/>
    </style:style>
    <style:style style:name="T6" style:family="text">
      <style:text-properties officeooo:rsid="001c43a4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291c71"/>
    </style:style>
    <style:style style:name="T9" style:family="text">
      <style:text-properties officeooo:rsid="0010296b"/>
    </style:style>
    <style:style style:name="T10" style:family="text">
      <style:text-properties officeooo:rsid="001ad0ba"/>
    </style:style>
    <style:style style:name="T11" style:family="text">
      <style:text-properties officeooo:rsid="0025786f"/>
    </style:style>
    <style:style style:name="T12" style:family="text">
      <style:text-properties fo:font-style="italic" officeooo:rsid="0025786f" style:font-style-asian="italic" style:font-style-complex="italic"/>
    </style:style>
    <style:style style:name="T13" style:family="text">
      <style:text-properties fo:font-style="normal" officeooo:rsid="0025786f" style:font-style-asian="normal" style:font-style-complex="normal"/>
    </style:style>
    <style:style style:name="T14" style:family="text">
      <style:text-properties fo:font-style="normal" officeooo:rsid="002f93d9" style:font-style-asian="normal" style:font-style-complex="normal"/>
    </style:style>
    <style:style style:name="T15" style:family="text">
      <style:text-properties fo:font-style="normal" officeooo:rsid="00262e3d" style:font-style-asian="normal" style:font-style-complex="normal"/>
    </style:style>
    <style:style style:name="T16" style:family="text">
      <style:text-properties officeooo:rsid="00196913"/>
    </style:style>
    <style:style style:name="T17" style:family="text">
      <style:text-properties officeooo:rsid="00197009"/>
    </style:style>
    <style:style style:name="T18" style:family="text">
      <style:text-properties fo:font-family="'Courier New'" style:font-family-generic="modern" style:font-pitch="fixed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officeooo:rsid="001f4653"/>
    </style:style>
    <style:style style:name="T21" style:family="text">
      <style:text-properties fo:font-family="'Courier New'" style:font-family-generic="modern" style:font-pitch="fixed" officeooo:rsid="001f4653"/>
    </style:style>
    <style:style style:name="T22" style:family="text">
      <style:text-properties style:font-name="Liberation Serif" officeooo:rsid="00291c71"/>
    </style:style>
    <style:style style:name="T23" style:family="text">
      <style:text-properties fo:font-family="'Courier New'" style:font-family-generic="modern" style:font-pitch="fixed" officeooo:rsid="001e077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0b3267"/>
    </style:style>
    <style:style style:name="T26" style:family="text">
      <style:text-properties fo:font-weight="bold" officeooo:rsid="0025786f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b3267" style:font-weight-asian="normal" style:font-weight-complex="normal"/>
    </style:style>
    <style:style style:name="T29" style:family="text">
      <style:text-properties fo:font-weight="bold" officeooo:rsid="000f3f4f" style:font-weight-asian="bold" style:font-weight-complex="bold"/>
    </style:style>
    <style:style style:name="T30" style:family="text">
      <style:text-properties fo:font-weight="bold" officeooo:rsid="0015c279" style:font-weight-asian="bold" style:font-weight-complex="bold"/>
    </style:style>
    <style:style style:name="T31" style:family="text">
      <style:text-properties fo:font-weight="normal" officeooo:rsid="000f3f4f" style:font-weight-asian="normal" style:font-weight-complex="normal"/>
    </style:style>
    <style:style style:name="T32" style:family="text">
      <style:text-properties fo:font-family="'Courier New'" style:font-family-generic="modern" style:font-pitch="fixed" officeooo:rsid="0021118b"/>
    </style:style>
    <style:style style:name="T33" style:family="text">
      <style:text-properties fo:font-family="'Courier New'" style:font-family-generic="modern" style:font-pitch="fixed" officeooo:rsid="0025786f"/>
    </style:style>
    <style:style style:name="T34" style:family="text">
      <style:text-properties fo:font-family="'Courier New'" style:font-family-generic="modern" style:font-pitch="fixed" officeooo:rsid="00291c71"/>
    </style:style>
    <style:style style:name="T35" style:family="text">
      <style:text-properties style:font-name="Liberation Serif" officeooo:rsid="0030338b"/>
    </style:style>
    <style:style style:name="T36" style:family="text">
      <style:text-properties officeooo:rsid="00230586"/>
    </style:style>
    <style:style style:name="T37" style:family="text">
      <style:text-properties fo:font-family="'Courier New'" style:font-family-generic="modern" style:font-pitch="fixed" officeooo:rsid="00230586"/>
    </style:style>
    <style:style style:name="T38" style:family="text">
      <style:text-properties officeooo:rsid="002b011d"/>
    </style:style>
    <style:style style:name="T39" style:family="text">
      <style:text-properties officeooo:rsid="00176c3e"/>
    </style:style>
    <style:style style:name="T40" style:family="text">
      <style:text-properties fo:font-family="'Courier New'" style:font-family-generic="modern" style:font-pitch="fixed" officeooo:rsid="002b011d"/>
    </style:style>
    <style:style style:name="T41" style:family="text">
      <style:text-properties officeooo:rsid="0021118b"/>
    </style:style>
    <style:style style:name="T42" style:family="text">
      <style:text-properties style:font-name="Liberation Serif" officeooo:rsid="0021118b"/>
    </style:style>
    <style:style style:name="T43" style:family="text">
      <style:text-properties officeooo:rsid="000c74de"/>
    </style:style>
    <style:style style:name="T44" style:family="text">
      <style:text-properties fo:font-family="'Courier New'" style:font-family-generic="modern" style:font-pitch="fixed" officeooo:rsid="00270d7b"/>
    </style:style>
    <style:style style:name="T45" style:family="text">
      <style:text-properties officeooo:rsid="002c9833"/>
    </style:style>
    <style:style style:name="T46" style:family="text">
      <style:text-properties officeooo:rsid="001f465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812cm" fo:text-indent="-0.635cm" fo:margin-left="7.81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447cm" fo:text-indent="-0.635cm" fo:margin-left="8.447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AIL</text:p>
      <text:p text:style-name="P1">Not An Inform Library</text:p>
      <text:p text:style-name="P2">Version <text:span text:style-name="T1">1</text:span>.<text:span text:style-name="T2">4</text:span></text:p>
      <text:p text:style-name="P3">by Fredrik Ramsberg</text:p>
      <text:p text:style-name="P4"/>
      <text:h text:style-name="Heading_20_1" text:outline-level="1">What is NAIL?</text:h>
      <text:p text:style-name="P5">It’s simliar to a standard library for Inform 6, like a scaled-down version of PunyInform, meant for writing games for platforms with very little RAM. However, it lacks much of the finesse of PunyInform, and it’s <text:span text:style-name="T3">a less</text:span> clean approach. <text:span text:style-name="T3">Essentially, y</text:span>ou get <text:span text:style-name="T3">two</text:span> source code files to start with <text:span text:style-name="T3">(</text:span><text:span text:style-name="T4">game.inf</text:span><text:span text:style-name="T3"> and </text:span><text:span text:style-name="T4">grammar.inf</text:span><text:span text:style-name="T3">)</text:span>, you edit them until you’re happy, use two Ruby-scripts to <text:span text:style-name="T5">transform the files to a compilable form</text:span>, then compile them to a z3-file.</text:p>
      <text:h text:style-name="Heading_20_2" text:outline-level="2">How is <text:span text:style-name="T5">NAIL</text:span> better than PunyInform?</text:h>
      <text:list text:style-name="L1">
        <text:list-item>
          <text:p text:style-name="P6">It’s smaller. The minimum size <text:span text:style-name="T5">of a compiled game </text:span>is <text:span text:style-name="T6">less than</text:span> 1<text:span text:style-name="T6">1</text:span> KB, which is less than half the minimum size of PunyInform.</text:p>
        </text:list-item>
      </text:list>
      <text:h text:style-name="Heading_20_2" text:outline-level="2">How is <text:span text:style-name="T5">NAIL</text:span> worse than PunyInform?</text:h>
      <text:list text:style-name="L2">
        <text:list-item>
          <text:p text:style-name="P7">The parser is a <text:span text:style-name="T7">lot</text:span> simpler. It doesn’t support any parse tokens that use a routine <text:span text:style-name="T8">(</text:span>e.g. scope tokens or general parse routines<text:span text:style-name="T8">)</text:span>, giving orders to NPCs, multiple objects like ”get pear and apple” (Special case: ”get/drop all [but x]” is supported, <text:span text:style-name="T9">and secondary/indirect object is supported, e.g. ”put x in y”</text:span>).</text:p>
        </text:list-item>
        <text:list-item>
          <text:p text:style-name="P8">Updating the library to a new version <text:span text:style-name="T10">for</text:span> an existing project is hard<text:span text:style-name="T3">er</text:span>, because there is no clear separation between game code and library code. <text:span text:style-name="T11">However, </text:span><text:span text:style-name="T12">most</text:span><text:span text:style-name="T13"> of the library code is located in nail.h and parser.h, which you </text:span><text:span text:style-name="T14">shouldn’t</text:span><text:span text:style-name="T13"> need to touch, so if there’s a new version of NAIL, which includes changes to these two files, you can copy the new versions of these files into your </text:span><text:span text:style-name="T14">lib </text:span><text:span text:style-name="T13">folder, </text:span><text:span text:style-name="T15">overwriting the old versions</text:span><text:span text:style-name="T13">.</text:span></text:p>
        </text:list-item>
        <text:list-item>
          <text:p text:style-name="P8">Unlike PunyInform, there is no test suite that ensures that new versions don’t ruin existing functionality.</text:p>
        </text:list-item>
        <text:list-item>
          <text:p text:style-name="P7">The only supported output format is z3.</text:p>
        </text:list-item>
        <text:list-item>
          <text:p text:style-name="P7">The player can’t be in a closed, <text:span text:style-name="T16">non-transparent</text:span> container or in/on a nested container/supporter.</text:p>
        </text:list-item>
        <text:list-item>
          <text:p text:style-name="P7"><text:span text:style-name="T17">There is no</text:span> support <text:span text:style-name="T17">for </text:span><text:span text:style-name="T8">properties</text:span><text:span text:style-name="T17"> </text:span><text:span text:style-name="T18">add_to_scope</text:span>, <text:span text:style-name="T18">react_before</text:span> or <text:span text:style-name="T18">react_after</text:span> (there are ways to accomplish the same effect, but with messier code, see chapter on limitations).</text:p>
        </text:list-item>
        <text:list-item>
          <text:p text:style-name="P9">Parser error messages, as well as action messages, are cruder and more generic.</text:p>
        </text:list-item>
        <text:list-item>
          <text:p text:style-name="P7">The documentation is laughably bad. Expect to dig in source code files to find stuff out.</text:p>
        </text:list-item>
        <text:list-item>
          <text:p text:style-name="P7">You need to have Ruby installed <text:span text:style-name="T17">(used every time you compile a game)</text:span>.</text:p>
        </text:list-item>
      </text:list>
      <text:h text:style-name="P10" text:outline-level="1"><text:soft-page-break/>Getting started</text:h>
      <text:p text:style-name="P11">Copy the folder <text:span text:style-name="T18">examples/template. </text:span><text:span text:style-name="T19">Give the new folder a name you like. Edit the paths at the beginning of the file </text:span><text:span text:style-name="T18">build.bat </text:span><text:span text:style-name="T20">(or, if using Linux or MacOS:</text:span><text:span text:style-name="T21"> build.sh</text:span><text:span text:style-name="T20">)</text:span><text:span text:style-name="T19">. Start a command prompt. Navigate to your new folder. Type </text:span><text:span text:style-name="T18">build.bat</text:span><text:span text:style-name="T19"> </text:span><text:span text:style-name="T20">or </text:span><text:span text:style-name="T21">build.sh</text:span><text:span text:style-name="T19">. If all goes well, you should see </text:span><text:span text:style-name="T22">four</text:span><text:span text:style-name="T19"> new generated source code files appearing in your folder, and two new z3 files - one with DEBUG enabled and one without.</text:span></text:p>
      <text:h text:style-name="P12" text:outline-level="1">The files</text:h>
      <text:p text:style-name="Standard">The standard project consists of these files <text:span text:style-name="T1">(found in </text:span><text:span text:style-name="T23">examples/template</text:span><text:span text:style-name="T1">)</text:span>:</text:p>
      <text:list text:style-name="L3">
        <text:list-item>
          <text:p text:style-name="P13"><text:span text:style-name="T24">game.inf -</text:span>The main source code of the game. <text:span text:style-name="T25">Expect to edit this file a lot.</text:span></text:p>
        </text:list-item>
      </text:list>
      <text:list xml:id="list4059573451" text:style-name="L4">
        <text:list-item>
          <text:p text:style-name="P14"><text:span text:style-name="T26">grammar</text:span><text:span text:style-name="T24">.</text:span><text:span text:style-name="T26">inf</text:span><text:span text:style-name="T24"> - </text:span><text:span text:style-name="T27">The action routines and the grammar for the game. </text:span><text:span text:style-name="T28">Expect to edit this quite a bit.</text:span></text:p>
        </text:list-item>
        <text:list-item>
          <text:p text:style-name="P15"><text:span text:style-name="T29">abbrev</text:span><text:span text:style-name="T30">iations</text:span><text:span text:style-name="T29">.h <text:s/></text:span><text:span text:style-name="T31">- Abbreviations to improve text compression. Included by game.inf. From time to time, you’ll want to use Zabbrev to figure out the best abbreviations for your game.</text:span></text:p>
        </text:list-item>
        <text:list-item>
          <text:p text:style-name="P16"><text:span text:style-name="T24">build.bat </text:span>- A batch file for Windows, to perform the steps needed to build Z-code files. <text:span text:style-name="T9">This is what it does</text:span><text:span text:style-name="T25">:</text:span></text:p>
        </text:list-item>
      </text:list>
      <text:list text:style-name="L5">
        <text:list-item>
          <text:p text:style-name="P17">Run <text:span text:style-name="T32">bin/</text:span><text:span text:style-name="T18">build_dictionary.rb</text:span>, producing <text:span text:style-name="T18">generated_dictionary.inf</text:span></text:p>
        </text:list-item>
        <text:list-item>
          <text:p text:style-name="P17">Run <text:span text:style-name="T32">bin/</text:span><text:span text:style-name="T18">transform_code.rb</text:span>, producing <text:span text:style-name="T18">generated_game.inf</text:span>, <text:span text:style-name="T18">generated_</text:span><text:span text:style-name="T33">grammar</text:span><text:span text:style-name="T18">.inf</text:span>, <text:span text:style-name="T11">and </text:span><text:span text:style-name="T33">generated_parser.h</text:span></text:p>
        </text:list-item>
        <text:list-item>
          <text:p text:style-name="P17"><text:span text:style-name="T9">Use</text:span> <text:span text:style-name="T18">inform6.exe</text:span> to compile <text:span text:style-name="T18">generated_game.inf</text:span>, which in turn includes <text:span text:style-name="T18">nail.h</text:span>, <text:span text:style-name="T18">generated_dictionary.inf</text:span>, <text:span text:style-name="T18">generated_parser.</text:span><text:span text:style-name="T33">h</text:span><text:span text:style-name="T11"> and </text:span><text:span text:style-name="T33">generated_grammar.inf</text:span>, to produce <text:span text:style-name="T18">game_debug.z3</text:span> and <text:span text:style-name="T18">game.z3</text:span></text:p>
        </text:list-item>
      </text:list>
      <text:list text:style-name="L6">
        <text:list-item>
          <text:p text:style-name="P18"><text:span text:style-name="T24">build.sh</text:span> - a shell script to do the same thing as <text:span text:style-name="T18">build.bat</text:span></text:p>
        </text:list-item>
      </text:list>
      <text:p text:style-name="P19"/>
      <text:p text:style-name="P19">All projects need to have access to the <text:span text:style-name="T18">bin</text:span> folder. In this folder, you find these Ruby files:</text:p>
      <text:list text:continue-list="list4059573451" text:style-name="L4">
        <text:list-item>
          <text:p text:style-name="P20"><text:span text:style-name="T24">build_dictionary.rb </text:span>- Reads the source code files that contain dictionary words (<text:span text:style-name="T18">game.inf</text:span>, <text:span text:style-name="T34">grammar.inf</text:span><text:span text:style-name="T8"> </text:span>and <text:span text:style-name="T18">parser.</text:span><text:span text:style-name="T34">h</text:span>) and creates/overwrites a file called <text:span text:style-name="T18">generated_dictionary.inf.</text:span><text:span text:style-name="T35">This program takes two optional parameters, allowing you to skip time-consuming trials of factor values that you know won’t be successful – as the very fitst arguments, you can give one or both of the parameters -s [n] and -e [n] to set the start and end of the range of factor values to try. E.g. ”-s 37 -e 1000” limits the range to 37-1000. </text:span></text:p>
        </text:list-item>
        <text:list-item>
          <text:p text:style-name="P21"><text:span text:style-name="T24">transform_code.rb</text:span> - Reads <text:span text:style-name="T18">generated_dictionary.inf</text:span>, then reads <text:span text:style-name="T18">game.inf</text:span> and creates/overwrites <text:span text:style-name="T18">generated_game.inf</text:span> where each dictionary word has been replaced by the corresponing constant from <text:span text:style-name="T18">generated_dictionary.inf</text:span>, then it reads <text:span text:style-name="T34">grammar.inf</text:span><text:span text:style-name="T8"> and creates/overwrites </text:span><text:span text:style-name="T34">generated_grammar.inf</text:span><text:span text:style-name="T8">, and reads </text:span><text:span text:style-name="T18">parser.</text:span><text:span text:style-name="T34">h</text:span> and creates/overwrites <text:span text:style-name="T18">generated_parser.</text:span><text:span text:style-name="T34">h</text:span> in the same manner.</text:p>
        </text:list-item>
      </text:list>
      <text:p text:style-name="P22"/>
      <text:p text:style-name="P22">All projects <text:span text:style-name="T3">also </text:span>need to have access to the <text:span text:style-name="T4">lib</text:span> folder. In this folder, you find these files:</text:p>
      <text:list text:style-name="L7">
        <text:list-item>
          <text:p text:style-name="P23">nail.h<text:span text:style-name="T27"> – Contains most of the library code.</text:span></text:p>
        </text:list-item>
        <text:list-item>
          <text:p text:style-name="P23">parser.h<text:span text:style-name="T27"> – Contains the parser code and some supporting routines. </text:span></text:p>
        </text:list-item>
      </text:list>
      <text:p text:style-name="P22"/>
      <text:h text:style-name="Heading_20_1" text:outline-level="1">Action<text:span text:style-name="T25">s and </text:span>Grammar</text:h>
      <text:p text:style-name="Standard"><text:span text:style-name="T36">In the file </text:span><text:span text:style-name="T33">grammar</text:span><text:span text:style-name="T37">.inf</text:span><text:span text:style-name="T36">, c</text:span>reate a grammar table (e.g. <text:span text:style-name="T18">g_take</text:span>) for each verb (synonyms use the same grammar table though). Each line in the grammar table consists of an action, followed by up <text:soft-page-break/>to three grammar tokens or dictionary words. Alternative prepositions are not supported. E.g. <text:span text:style-name="T38">support</text:span>ing "PUT X IN/INTO Y" requires two grammar lines.</text:p>
      <text:p text:style-name="Standard"/>
      <text:p text:style-name="Standard">The available tokens are:</text:p>
      <text:list text:style-name="L8">
        <text:list-item>
          <text:p text:style-name="P24"><text:span text:style-name="T24">T_NOUN</text:span>: Matches an object, which is then put into the <text:span text:style-name="T18">noun</text:span> variable.</text:p>
        </text:list-item>
        <text:list-item>
          <text:p text:style-name="P24"><text:span text:style-name="T24">T_SECOND</text:span>: Matches an object, which is then put into the <text:span text:style-name="T18">second</text:span> variable.</text:p>
        </text:list-item>
        <text:list-item>
          <text:p text:style-name="P24"><text:span text:style-name="T24">T_DIRECTION</text:span>: Matches a direction, which is then put into the <text:span text:style-name="T18">direction</text:span> variable. (Directions are not objects, in any way).</text:p>
        </text:list-item>
        <text:list-item>
          <text:p text:style-name="P24"><text:span text:style-name="T24">T_TOPIC</text:span>: Matches any number of words. Must be followed by a <text:span text:style-name="T38">preposition</text:span>, or be the last token on the line.</text:p>
        </text:list-item>
        <text:list-item>
          <text:p text:style-name="P24"><text:span text:style-name="T24">T_ALL</text:span>: Matches 'all' or 'everything'</text:p>
        </text:list-item>
        <text:list-item>
          <text:p text:style-name="P24"><text:span text:style-name="T24">T_BUT</text:span>: Matches 'but' or 'except'</text:p>
        </text:list-item>
        <text:list-item>
          <text:p text:style-name="P24"><text:span text:style-name="T24">T_SET_META</text:span>: Has to be the first entry in a grammar table. Doesn't match anything, but sets <text:span text:style-name="T18">meta = true</text:span> for the entire grammar table.</text:p>
        </text:list-item>
      </text:list>
      <text:h text:style-name="Heading_20_1" text:outline-level="1">Dictionary</text:h>
      <text:p text:style-name="P25">There is no dictionary. Instead each word is represented by a 16-bit checksum of that word - a number which is either in the range [-2000, -977] or [1024, 32767] <text:span text:style-name="T39">(a range of numbers around 0 is deliberately avoided, because it’s convenient to be able to tell dictionary word checksums from NULL, false, true, object numbers, verb numbers, and some other values</text:span>. </text:p>
      <text:p text:style-name="P25"/>
      <text:p text:style-name="P25">When the player has typed a command, the parser calculates and stores the checksum for each typed word in the parse table. The game <text:span text:style-name="T25">author</text:span> can compare these values to dictionary words in the code, but <text:span text:style-name="T36">the build process will in fact replace </text:span>the dictionary words <text:span text:style-name="T36">with</text:span> constants representing the checksum of these words, <text:span text:style-name="T36">when generating </text:span><text:span text:style-name="T37">generated_game.inf</text:span><text:span text:style-name="T36">, </text:span><text:span text:style-name="T40">generated_grammar.inf</text:span><text:span text:style-name="T38">, </text:span><text:span text:style-name="T36">and </text:span><text:span text:style-name="T37">generated_parser.</text:span><text:span text:style-name="T40">h</text:span>.</text:p>
      <text:p text:style-name="Standard"/>
      <text:p text:style-name="P26">The names of the constants for different words are derived from the words, e.g. ’east’ gets the constant name W_EAST. A single quote character is transformed to _Q_ , so ’tom^s’ gets the constant name W_TOM_Q_S.</text:p>
      <text:p text:style-name="P26"/>
      <text:p text:style-name="P26">If you have a word which can’t be turned into a constant in this automated manner, maybe because it contains illegal characters or because the name is already in use, you <text:span text:style-name="T38">can</text:span> decide on a constant name yourself, and declare it in a comment in <text:span text:style-name="T18">game.inf</text:span>. This is what it may look like:</text:p>
      <text:p text:style-name="P26"/>
      <text:p text:style-name="Preformatted_20_Text">! 'to' = W_TO_WORD</text:p>
      <text:p text:style-name="Preformatted_20_Text"/>
      <text:p text:style-name="P27">This particular line avoids having the constant for ’w//’ collide with the w_to property. Note that you can only declare one such constant per line.</text:p>
      <text:p text:style-name="P28">If a certain constant name would contain special characters, and you have not assigned a special name to it in this way, it will be called <text:span text:style-name="T18">W_SPECIAL_WORD_</text:span>n , where n is 0, 1, 2 etc.</text:p>
      <text:p text:style-name="P29"><text:span text:style-name="T24">Note</text:span>: <text:span text:style-name="T36">Encoding the words as checksums involves finding an encoding factor that give all the words distinct checksums. </text:span>As the list of words your game recognize<text:span text:style-name="T36">s</text:span> grows, it is possible that the <text:span text:style-name="T18">build</text:span><text:span text:style-name="T32">_dictionary.rb</text:span><text:span text:style-name="T41"> script will fail to find a factor which makes all words get distinct values. If this happens, you will see that build_dictionary reports some collisions. The exact collisions are listed in </text:span><text:span text:style-name="T32">generated_dictionary.inf</text:span><text:span text:style-name="T42">. If this happens, read the list of collisions, and decide if it’s important that the parser can tell these words apart. E.g. if there is a collision between two words that are only used for two different static or scenery objects, which </text:span><text:soft-page-break/><text:span text:style-name="T42">will never be in scope at the same time, it doesn’t matter. If you have collisions that matter, consider leaving out a synonym for an object or a verb, or even renaming an object. Note that a collision between a verb and a noun is typically okay – the parser can’t confuse them.</text:span></text:p>
      <text:h text:style-name="P30" text:outline-level="1">Limitations <text:span text:style-name="T36">of NAIL, </text:span>compared to PunyInform</text:h>
      <text:list text:style-name="L9">
        <text:list-item>
          <text:p text:style-name="P31">z3 is the only target supported</text:p>
        </text:list-item>
        <text:list-item>
          <text:p text:style-name="P31">Parser limitations:</text:p>
        </text:list-item>
      </text:list>
      <text:list text:style-name="L10">
        <text:list-item>
          <text:list>
            <text:list-item>
              <text:p text:style-name="P32">NOT SUPPORTED: Multiple objects or plural, except for "take all [but x]" and "drop all [but x]". E.g. "take pear and apple" isn't supported. Secondary object is supported, e.g. "put apple in box".</text:p>
            </text:list-item>
            <text:list-item>
              <text:p text:style-name="P32">NOT SUPPORTED: Giving NPCs orders, e.g. "John, pull lever".</text:p>
            </text:list-item>
            <text:list-item>
              <text:p text:style-name="P32">NOT SUPPORTED: grammar tokens involving routines (scope tokens, general parse routines etc)</text:p>
            </text:list-item>
            <text:list-item>
              <text:p text:style-name="P32">NOT SUPPORTED: grammar lines with alternative prepositions</text:p>
            </text:list-item>
          </text:list>
        </text:list-item>
      </text:list>
      <text:list text:style-name="L11">
        <text:list-item>
          <text:p text:style-name="P33">The player must never be in a closed, <text:span text:style-name="T43">non-transparent</text:span> container. Workaround: Move the player to a room that represents the inside of the container.</text:p>
        </text:list-item>
        <text:list-item>
          <text:p text:style-name="P33">Nested enterable objects are not supported (e.g. a seat in a car).</text:p>
        </text:list-item>
        <text:list-item>
          <text:p text:style-name="P33">Regular grammar tables are not in use, and you can't use <text:span text:style-name="T18">Verb</text:span> or <text:span text:style-name="T18">Extend</text:span>. You have to alter the grammar in the file where it is defined (typically <text:span text:style-name="T44">grammar</text:span><text:span text:style-name="T18">.inf</text:span>).</text:p>
        </text:list-item>
        <text:list-item>
          <text:p text:style-name="P33">Since there is no dictionary, you can't print dictionary words, or check for verb flag etc.</text:p>
        </text:list-item>
        <text:list-item>
          <text:p text:style-name="P33">Scope can only be calculated for the player, not for other actors.</text:p>
        </text:list-item>
        <text:list-item>
          <text:p text:style-name="P34">Attributes <text:span text:style-name="T18">edible</text:span>, <text:span text:style-name="T18">talkable</text:span> are not supported.</text:p>
        </text:list-item>
        <text:list-item>
          <text:p text:style-name="P33">Properties <text:span text:style-name="T18">orders</text:span>, <text:span text:style-name="T18">grammar</text:span>, <text:span text:style-name="T18">life</text:span>, <text:span text:style-name="T18">capacity</text:span>, <text:span text:style-name="T18">inside_description</text:span>, <text:span text:style-name="T18">list_together</text:span> are not supported.</text:p>
        </text:list-item>
        <text:list-item>
          <text:p text:style-name="P33">Property <text:span text:style-name="T18">add_to_scope</text:span> is not supported. Use entry point <text:span text:style-name="T18">InScope</text:span> instead.</text:p>
        </text:list-item>
        <text:list-item>
          <text:p text:style-name="P33">Properties <text:span text:style-name="T18">react_before</text:span> and <text:span text:style-name="T18">react_after</text:span> are not supported. Use <text:span text:style-name="T18">before</text:span>/<text:span text:style-name="T18">after</text:span> in location, or <text:span text:style-name="T18">GamePreRoutine</text:span>/<text:span text:style-name="T18">GamePostRoutine</text:span> instead. </text:p>
        </text:list-item>
        <text:list-item>
          <text:p text:style-name="P33">Properties <text:span text:style-name="T18">when_on</text:span>, <text:span text:style-name="T18">when_off</text:span>, <text:span text:style-name="T18">when_open</text:span>, <text:span text:style-name="T18">when_closed</text:span> are not supported. Use <text:span text:style-name="T18">initial</text:span> and <text:span text:style-name="T18">describe</text:span> <text:span text:style-name="T25">instead</text:span>.</text:p>
          <text:p text:style-name="P33"/>
        </text:list-item>
      </text:list>
      <text:h text:style-name="Heading_20_1" text:outline-level="1">Differences to PunyInform</text:h>
      <text:list text:style-name="L12">
        <text:list-item>
          <text:p text:style-name="P35">Directions are not considered objects, in any way.</text:p>
        </text:list-item>
        <text:list-item>
          <text:p text:style-name="P36">If a command involves a direction, it is stored in the <text:span text:style-name="T18">direction</text:span> variable.</text:p>
        </text:list-item>
        <text:list-item>
          <text:p text:style-name="P36"><text:span text:style-name="T18">noun</text:span>/<text:span text:style-name="T18">second</text:span> are not used to store anything but object numbers. </text:p>
        </text:list-item>
        <text:list-item>
          <text:p text:style-name="P37">The first word of a topic (not counting articles) is stored in <text:span text:style-name="T18">first_topic_word</text:span>.</text:p>
        </text:list-item>
        <text:list-item>
          <text:p text:style-name="P38">There is no grammar token for a number, but you can use a <text:span text:style-name="T21">T_TOPIC</text:span> token instead, and use <text:span text:style-name="T18">x = TryNumber(consult_from)</text:span> to extract a number from the first word, or decide that it’s not a number (-1000 means not a number, 0-10000 means a number).</text:p>
        </text:list-item>
        <text:list-item>
          <text:p text:style-name="P39">Simple doors (an optional feature in PunyInform) is always available in NAIL. There is no constant to enable or disable it.</text:p>
        </text:list-item>
        <text:list-item>
          <text:p text:style-name="P40">Since there is no <text:span text:style-name="T18">life</text:span> property, you use <text:span text:style-name="T18">before</text:span> to react instead (<text:span text:style-name="T45">##</text:span>Ask, <text:span text:style-name="T45">##</text:span>Tell, <text:span text:style-name="T45">##</text:span>Give, <text:span text:style-name="T45">##</text:span>Show, <text:span text:style-name="T45">##</text:span>Attack, <text:span text:style-name="T45">##</text:span>ThrownAt, <text:span text:style-name="T45">##</text:span>Answer).</text:p>
        </text:list-item>
        <text:list-item>
          <text:p text:style-name="P40"><text:soft-page-break/><text:span text:style-name="T46">##</text:span>Give and <text:span text:style-name="T46">##</text:span>Show have the actor as noun, so an actor's <text:span text:style-name="T18">before</text:span> routine can react to these actions. (Just like in PunyInform / Inform 6, <text:span text:style-name="T46">##</text:span>Ask and <text:span text:style-name="T46">##</text:span>Tell have the actor as noun).</text:p>
        </text:list-item>
        <text:list-item>
          <text:p text:style-name="P40">Instead of using the <text:span text:style-name="T18">name</text:span> property, you use the <text:span text:style-name="T18">nouns</text:span> property to store a list of synonyms for an object. If you need more than four synonyms, use the <text:span text:style-name="T18">longnouns</text:span> property instead - an individual property, which takes up more space and is slower to access, but can hold up to 32 values.</text:p>
        </text:list-item>
        <text:list-item>
          <text:p text:style-name="P40">Property <text:span text:style-name="T18">invent</text:span> is only called once per object, not with different <text:span text:style-name="T18">invent_stage</text:span> values. It can either print all information about the object and return true, or don't print anything and return false, <text:span text:style-name="T45">or (sometimes useful) print something (e.g. ”full ” or ”empty ”) and return false to have the object printed in the normal way</text:span>.</text:p>
        </text:list-item>
        <text:list-item>
          <text:p text:style-name="P40">The author must always set <text:span text:style-name="T18">scope_modified = true</text:span> when doing something which may affect what's in scope. (This is optional in PunyInform, see <text:span text:style-name="T18">OPTIONAL_MANUAL_SCOPE</text:span>. Here, it's mandatory.)</text:p>
        </text:list-item>
        <text:list-item>
          <text:p text:style-name="P40"><text:span text:style-name="T46">As an</text:span> author, <text:span text:style-name="T46">you</text:span> must give the <text:span text:style-name="T18">reactive</text:span> attribute to all objects that provide the <text:span text:style-name="T18">each_turn</text:span> property. (This is optional in PunyInform, see <text:span text:style-name="T18">OPTIONAL_MANUAL_REACTIVE</text:span>. Here, it's mandatory.) If <text:span text:style-name="T46">you</text:span> define <text:span text:style-name="T18">OPTIONAL_REACTIVE_PARSE_NAME</text:span>, <text:span text:style-name="T46">you</text:span> must also give <text:span text:style-name="T18">reactive</text:span> to all objects that provide <text:span text:style-name="T18">parse_name</text:span>. </text:p>
        </text:list-item>
        <text:list-item>
          <text:p text:style-name="P40">Lookmode commands use the Look verb: "look short/superbrief", "look normal/brief", "look long/verbose". <text:span text:style-name="T46">Also, the ability to control lookmode is optional – set </text:span><text:span text:style-name="T21">OPTIONAL_LOOKMODE</text:span><text:span text:style-name="T46"> to enable it.</text:span></text:p>
        </text:list-item>
        <text:list-item>
          <text:p text:style-name="P41">Disambiguation can only be done by having the user select one of the objects from a numbered list, using a special prompt. Failing to select an object means the first object in the list is selected.</text:p>
        </text:list-item>
      </text:list>
      <text:h text:style-name="Heading_20_1" text:outline-level="1">Supported user-defined constants:</text:h>
      <text:p text:style-name="Standard"/>
      <text:list text:style-name="L13">
        <text:list-item>
          <text:p text:style-name="P42">Story</text:p>
        </text:list-item>
        <text:list-item>
          <text:p text:style-name="P42">Headline</text:p>
        </text:list-item>
        <text:list-item>
          <text:p text:style-name="P42">DEBUG</text:p>
        </text:list-item>
        <text:list-item>
          <text:p text:style-name="P42">INITIAL_LOCATION_VALUE</text:p>
        </text:list-item>
        <text:list-item>
          <text:p text:style-name="P42">GOTOSUB_BUFFER_SIZE - In DEBUG mode, set to length of longest object name</text:p>
        </text:list-item>
        <text:list-item>
          <text:p text:style-name="P42">MAX_FLOATING_OBJECTS</text:p>
        </text:list-item>
        <text:list-item>
          <text:p text:style-name="P42">MAX_SCOPE</text:p>
        </text:list-item>
        <text:list-item>
          <text:p text:style-name="P43">MAX_WHICH_OBJECTS</text:p>
        </text:list-item>
        <text:list-item>
          <text:p text:style-name="P42">NO_PLACES - See DM4</text:p>
        </text:list-item>
        <text:list-item>
          <text:p text:style-name="P42">OPTIONAL_DARKNESS (Opposite of PunyInform's OPTIONAL_NO_DARKNESS)</text:p>
        </text:list-item>
        <text:list-item>
          <text:p text:style-name="P42">OPTIONAL_LOOKMODE - Support "look short/normal/long" to choose lookmode</text:p>
        </text:list-item>
        <text:list-item>
          <text:p text:style-name="P42">OPTIONAL_PRONOUNS - Support it/him/her/them in commands</text:p>
        </text:list-item>
        <text:list-item>
          <text:p text:style-name="P42">OPTIONAL_REACTIVE_PARSE_NAME - See PunyInform</text:p>
        </text:list-item>
        <text:list-item>
          <text:p text:style-name="P42">OPTIONAL_SCRIPT - Include support for "script on/off" and "recording on/off" and "replay"</text:p>
        </text:list-item>
        <text:list-item>
          <text:p text:style-name="P42">RUNTIME_ERRORS - See PunyInform</text:p>
        </text:list-item>
        <text:list-item>
          <text:p text:style-name="P42">STATUSLINE_SCORE - See PunyInform</text:p>
        </text:list-item>
        <text:list-item>
          <text:p text:style-name="P44">STATUSLINE_TIME - See PunyInform</text:p>
        </text:list-item>
        <text:list-item>
          <text:p text:style-name="P44">Scoring:</text:p>
        </text:list-item>
      </text:list>
      <text:list text:style-name="L14">
        <text:list-item>
          <text:list>
            <text:list-item>
              <text:p text:style-name="P45">NO_SCORE - See PunyInform</text:p>
            </text:list-item>
            <text:list-item>
              <text:p text:style-name="P45">MAX_SCORE - See DM4</text:p>
            </text:list-item>
            <text:list-item>
              <text:p text:style-name="P45">OBJECT_SCORE - See DM4</text:p>
            </text:list-item>
            <text:list-item>
              <text:p text:style-name="P45">ROOM_SCORE - See DM4</text:p>
            </text:list-item>
            <text:list-item>
              <text:p text:style-name="P45"><text:soft-page-break/>OPTIONAL_SCORED - See PunyInform</text:p>
            </text:list-item>
            <text:list-item>
              <text:p text:style-name="P45">OPTIONAL_FULL_SCORE (NO_SCORE can't be defined) - See PunyInform</text:p>
            </text:list-item>
            <text:list-item>
              <text:p text:style-name="P45">TASKS_PROVIDED (requires OPTIONAL_FULL_SCORE) - See DM4</text:p>
            </text:list-item>
            <text:list-item>
              <text:p text:style-name="P45">NUMBER_TASKS (requires TASKS_PROVIDED) - See DM4</text:p>
            </text:list-item>
          </text:list>
        </text:list-item>
      </text:list>
      <text:p text:style-name="Standard"/>
      <text:h text:style-name="Heading_20_1" text:outline-level="1">Supported entry points </text:h>
      <text:p text:style-name="Text_20_body">(See DM4 <text:span text:style-name="T25">for most of them</text:span>)</text:p>
      <text:list text:style-name="L15">
        <text:list-item>
          <text:p text:style-name="P46">Amusing</text:p>
        </text:list-item>
        <text:list-item>
          <text:p text:style-name="P46">AfterLife</text:p>
        </text:list-item>
        <text:list-item>
          <text:p text:style-name="P46">DarkToDark</text:p>
        </text:list-item>
        <text:list-item>
          <text:p text:style-name="P46">DeathMessage</text:p>
        </text:list-item>
        <text:list-item>
          <text:p text:style-name="P46">DebugParseNameObject - See PunyInform</text:p>
        </text:list-item>
        <text:list-item>
          <text:p text:style-name="P46">GamePostRoutine</text:p>
        </text:list-item>
        <text:list-item>
          <text:p text:style-name="P46">GamePreRoutine</text:p>
        </text:list-item>
        <text:list-item>
          <text:p text:style-name="P46">InScope</text:p>
        </text:list-item>
        <text:list-item>
          <text:p text:style-name="P46">IsARoom - See PunyInform</text:p>
        </text:list-item>
        <text:list-item>
          <text:p text:style-name="P46">LookRoutine</text:p>
        </text:list-item>
        <text:list-item>
          <text:p text:style-name="P46">NewRoom</text:p>
        </text:list-item>
        <text:list-item>
          <text:p text:style-name="P46">PrintTaskName (requires OPTIONAL_FULL_SCORE)</text:p>
        </text:list-item>
        <text:list-item>
          <text:p text:style-name="P46">TimePasses</text:p>
          <text:p text:style-name="P46"/>
        </text:list-item>
      </text:list>
      <text:h text:style-name="Heading_20_1" text:outline-level="1"><text:span text:style-name="T25">Using PunyInform </text:span>Extensions</text:h>
      <text:list text:style-name="L16">
        <text:list-item>
          <text:p text:style-name="P47"><text:span text:style-name="T24">Cheap Scenery</text:span> - works. To make the 'cstest' debug verb work, you have to add grammar to your game to make "cstest" trigger the ##DebugCheapScenery action.</text:p>
        </text:list-item>
        <text:list-item>
          <text:p text:style-name="P47"><text:span text:style-name="T24">Flags</text:span> - works</text:p>
        </text:list-item>
        <text:list-item>
          <text:p text:style-name="P47"><text:span text:style-name="T24">Menu</text:span> - works</text:p>
        </text:list-item>
        <text:list-item>
          <text:p text:style-name="P47"><text:span text:style-name="T24">Quote Box</text:span> - works</text:p>
        </text:list-item>
        <text:list-item>
          <text:p text:style-name="P47"><text:span text:style-name="T24">Talk Menu</text:span> - works. You have to add grammar to your game to make "talk to noun" and "talk noun" trigger the ##Talk action. In Debug mode, you have to add grammar to make "tmtest" and "tmtest noun" trigger the ##TMTest action.</text:p>
        </text:list-item>
        <text:list-item>
          <text:p text:style-name="P47"><text:span text:style-name="T24">Wait Time</text:span> - Doesn't work. One would need to create a new reworked version which doesn't use a general parse rout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20:03:22.339826300</meta:creation-date>
    <dc:date>2026-07-09T00:38:14.305044300</dc:date>
    <meta:editing-duration>P20DT51M5S</meta:editing-duration>
    <meta:editing-cycles>29</meta:editing-cycles>
    <meta:generator>LibreOffice/25.2.5.2$Windows_X86_64 LibreOffice_project/03d19516eb2e1dd5d4ccd751a0d6f35f35e08022</meta:generator>
    <meta:document-statistic meta:table-count="0" meta:image-count="0" meta:object-count="0" meta:page-count="6" meta:paragraph-count="138" meta:word-count="2313" meta:character-count="13958" meta:non-whitespace-character-count="11874"/>
  </office:meta>
</office:document-meta>
</file>